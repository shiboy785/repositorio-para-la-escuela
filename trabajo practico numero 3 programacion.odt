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77e10" officeooo:paragraph-rsid="00077e10"/>
    </style:style>
    <style:style style:name="P2" style:family="paragraph" style:parent-style-name="Preformatted_20_Text">
      <style:text-properties officeooo:rsid="00077e10"/>
    </style:style>
    <style:style style:name="P3" style:family="paragraph" style:parent-style-name="Preformatted_20_Text">
      <style:paragraph-properties fo:margin-top="0cm" fo:margin-bottom="0.499cm" style:contextual-spacing="false"/>
      <style:text-properties officeooo:rsid="00077e10"/>
    </style:style>
    <style:style style:name="P4" style:family="paragraph" style:parent-style-name="Text_20_body">
      <style:text-properties officeooo:rsid="00077e10"/>
    </style:style>
    <style:style style:name="P5" style:family="paragraph" style:parent-style-name="Text_20_body">
      <style:text-properties officeooo:rsid="00077e10" officeooo:paragraph-rsid="00077e10"/>
    </style:style>
    <style:style style:name="P6" style:family="paragraph" style:parent-style-name="Preformatted_20_Text">
      <style:paragraph-properties fo:margin-top="0cm" fo:margin-bottom="0.247cm" style:contextual-spacing="false" fo:line-height="115%"/>
      <style:text-properties officeooo:rsid="00077e10"/>
    </style:style>
    <style:style style:name="P7" style:family="paragraph" style:parent-style-name="Text_20_body">
      <style:text-properties officeooo:rsid="0008a786" officeooo:paragraph-rsid="00077e10"/>
    </style:style>
    <style:style style:name="P8" style:family="paragraph" style:parent-style-name="Text_20_body">
      <style:text-properties officeooo:rsid="0008a786" officeooo:paragraph-rsid="0008a786"/>
    </style:style>
    <style:style style:name="P9" style:family="paragraph" style:parent-style-name="Preformatted_20_Text">
      <style:paragraph-properties fo:margin-top="0cm" fo:margin-bottom="0.247cm" style:contextual-spacing="false" fo:line-height="115%"/>
      <style:text-properties officeooo:rsid="0008a786"/>
    </style:style>
    <style:style style:name="P10" style:family="paragraph" style:parent-style-name="Text_20_body">
      <style:text-properties officeooo:rsid="0008a7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1:</text:p>
      <text:p text:style-name="P1">YO: </text:p>
      <text:p text:style-name="P1">como puedo completar este codigo? "</text:p>
      <text:p text:style-name="P2"><text:span text:style-name="Source_20_Text">&lt;script&gt;</text:span></text:p>
      <text:p text:style-name="P2"><text:span text:style-name="Source_20_Text"><text:s text:c="8"/>let componente = parseInt(prompt("Ingresa el numero del componente que deseas inventariar:\n1. Procesador\n2. Tarjeta Grafica\n3. Memoria RAM\n4. Disco Duro"));</text:span></text:p>
      <text:p text:style-name="P2"><text:span text:style-name="Source_20_Text"><text:s text:c="8"/>let stock = parseInt(prompt("Ingresa la cantidad disponible en stock:"));</text:span></text:p>
      <text:p text:style-name="P2"/>
      <text:p text:style-name="P2"><text:span text:style-name="Source_20_Text"><text:s text:c="8"/>let nombreComponente;</text:span></text:p>
      <text:p text:style-name="P2"><text:span text:style-name="Source_20_Text"><text:s text:c="8"/>switch (componente) {</text:span></text:p>
      <text:p text:style-name="P2"><text:span text:style-name="Source_20_Text"><text:s text:c="12"/>case 1:</text:span></text:p>
      <text:p text:style-name="P2"><text:span text:style-name="Source_20_Text"><text:s text:c="16"/>nombreComponente = "Procesador";</text:span></text:p>
      <text:p text:style-name="P2"><text:span text:style-name="Source_20_Text"><text:s text:c="16"/>break;</text:span></text:p>
      <text:p text:style-name="P2"><text:span text:style-name="Source_20_Text"><text:s text:c="12"/>case 2:</text:span></text:p>
      <text:p text:style-name="P2"><text:span text:style-name="Source_20_Text"><text:s text:c="16"/>nombreComponente = "Tarjeta Grafica";</text:span></text:p>
      <text:p text:style-name="P2"><text:span text:style-name="Source_20_Text"><text:s text:c="16"/>break;</text:span></text:p>
      <text:p text:style-name="P2"><text:span text:style-name="Source_20_Text"><text:s text:c="12"/>case 3:</text:span></text:p>
      <text:p text:style-name="P2"><text:span text:style-name="Source_20_Text"><text:s text:c="16"/>nombreComponente = "Memoria RAM";</text:span></text:p>
      <text:p text:style-name="P2"><text:span text:style-name="Source_20_Text"><text:s text:c="16"/>break;</text:span></text:p>
      <text:p text:style-name="P2"><text:span text:style-name="Source_20_Text"><text:s text:c="12"/>case 4:</text:span></text:p>
      <text:p text:style-name="P2"><text:span text:style-name="Source_20_Text"><text:s text:c="16"/>nombreComponente = "Disco Duro";</text:span></text:p>
      <text:p text:style-name="P2"><text:span text:style-name="Source_20_Text"><text:s text:c="16"/>break;</text:span></text:p>
      <text:p text:style-name="P2"><text:span text:style-name="Source_20_Text"><text:s text:c="12"/>default:</text:span></text:p>
      <text:p text:style-name="P2"><text:span text:style-name="Source_20_Text"><text:s text:c="16"/>nombreComponente = "Componente no válido";</text:span></text:p>
      <text:p text:style-name="P2"><text:span text:style-name="Source_20_Text"><text:s text:c="16"/>break;</text:span></text:p>
      <text:p text:style-name="P3"><text:span text:style-name="Source_20_Text"><text:s text:c="8"/>}</text:span></text:p>
      <text:p text:style-name="P4">" me falta Si el stock es menor a 3 → Mostrar: "Pedido urgente". ● Si el stock está entre 3 y 10 → Mostrar: "Stock bajo, considerar reponer". ● Si el stock es mayor a 10 → Mostrar: "Stock suficiente". como podria hacer ese codigo me podrias explicar que hace cada cosa</text:p>
      <text:p text:style-name="P5">IA:</text:p>
      <text:p text:style-name="P5">¡Claro! Después del <text:span text:style-name="Source_20_Text">switch</text:span>, necesitás agregar un <text:span text:style-name="Source_20_Text">if / else if / else</text:span> para evaluar el stock. Te explico cada parte:</text:p>
      <text:p text:style-name="P6"><text:span text:style-name="Source_20_Text">&lt;script&gt;</text:span></text:p>
      <text:p text:style-name="P6"><text:span text:style-name="Source_20_Text"><text:s text:c="4"/>let componente = parseInt(prompt("Ingresa el numero del componente que deseas inventariar:\n1. Procesador\n2. Tarjeta Grafica\n3. Memoria RAM\n4. Disco Duro"));</text:span></text:p>
      <text:p text:style-name="P6"><text:span text:style-name="Source_20_Text"><text:s text:c="4"/>let stock = parseInt(prompt("Ingresa la cantidad disponible en stock:"));</text:span></text:p>
      <text:p text:style-name="P6"/>
      <text:p text:style-name="P6"><text:span text:style-name="Source_20_Text"><text:s text:c="4"/>let nombreComponente;</text:span></text:p>
      <text:p text:style-name="P6"><text:span text:style-name="Source_20_Text"><text:s text:c="4"/>switch (componente) {</text:span></text:p>
      <text:p text:style-name="P6"><text:span text:style-name="Source_20_Text"><text:s text:c="8"/>case 1:</text:span></text:p>
      <text:p text:style-name="P6"><text:span text:style-name="Source_20_Text"><text:s text:c="12"/>nombreComponente = "Procesador";</text:span></text:p>
      <text:p text:style-name="P6"><text:span text:style-name="Source_20_Text"><text:s text:c="12"/>break;</text:span></text:p>
      <text:p text:style-name="P6"><text:span text:style-name="Source_20_Text"><text:s text:c="8"/>case 2:</text:span></text:p>
      <text:p text:style-name="P6"><text:span text:style-name="Source_20_Text"><text:s text:c="12"/>nombreComponente = "Tarjeta Grafica";</text:span></text:p>
      <text:p text:style-name="P6"><text:span text:style-name="Source_20_Text"><text:s text:c="12"/>break;</text:span></text:p>
      <text:p text:style-name="P6"><text:soft-page-break/><text:span text:style-name="Source_20_Text"><text:s text:c="8"/>case 3:</text:span></text:p>
      <text:p text:style-name="P6"><text:span text:style-name="Source_20_Text"><text:s text:c="12"/>nombreComponente = "Memoria RAM";</text:span></text:p>
      <text:p text:style-name="P6"><text:span text:style-name="Source_20_Text"><text:s text:c="12"/>break;</text:span></text:p>
      <text:p text:style-name="P6"><text:span text:style-name="Source_20_Text"><text:s text:c="8"/>case 4:</text:span></text:p>
      <text:p text:style-name="P6"><text:span text:style-name="Source_20_Text"><text:s text:c="12"/>nombreComponente = "Disco Duro";</text:span></text:p>
      <text:p text:style-name="P6"><text:span text:style-name="Source_20_Text"><text:s text:c="12"/>break;</text:span></text:p>
      <text:p text:style-name="P6"><text:span text:style-name="Source_20_Text"><text:s text:c="8"/>default:</text:span></text:p>
      <text:p text:style-name="P6"><text:span text:style-name="Source_20_Text"><text:s text:c="12"/>nombreComponente = "Componente no válido";</text:span></text:p>
      <text:p text:style-name="P6"><text:span text:style-name="Source_20_Text"><text:s text:c="12"/>break;</text:span></text:p>
      <text:p text:style-name="P6"><text:span text:style-name="Source_20_Text"><text:s text:c="4"/>}</text:span></text:p>
      <text:p text:style-name="P6"/>
      <text:p text:style-name="P6"><text:span text:style-name="Source_20_Text"><text:s text:c="4"/>// Evaluamos el stock con if / else if / else</text:span></text:p>
      <text:p text:style-name="P6"><text:span text:style-name="Source_20_Text"><text:s text:c="4"/>let estadoStock;</text:span></text:p>
      <text:p text:style-name="P6"/>
      <text:p text:style-name="P6"><text:span text:style-name="Source_20_Text"><text:s text:c="4"/>if (stock &lt; 3) {</text:span></text:p>
      <text:p text:style-name="P6"><text:span text:style-name="Source_20_Text"><text:s text:c="8"/>estadoStock = "Pedido urgente";</text:span></text:p>
      <text:p text:style-name="P6"><text:span text:style-name="Source_20_Text"><text:s text:c="4"/>} else if (stock &gt;= 3 &amp;&amp; stock &lt;= 10) {</text:span></text:p>
      <text:p text:style-name="P6"><text:span text:style-name="Source_20_Text"><text:s text:c="8"/>estadoStock = "Stock bajo, considerar reponer";</text:span></text:p>
      <text:p text:style-name="P6"><text:span text:style-name="Source_20_Text"><text:s text:c="4"/>} else {</text:span></text:p>
      <text:p text:style-name="P6"><text:span text:style-name="Source_20_Text"><text:s text:c="8"/>estadoStock = "Stock suficiente";</text:span></text:p>
      <text:p text:style-name="P6"><text:span text:style-name="Source_20_Text"><text:s text:c="4"/>}</text:span></text:p>
      <text:p text:style-name="P6"/>
      <text:p text:style-name="P6"><text:span text:style-name="Source_20_Text"><text:s text:c="4"/>alert("Componente: " + nombreComponente + "\nStock: " + stock + "\nEstado: " + estadoStock);</text:span></text:p>
      <text:p text:style-name="P6"><text:span text:style-name="Source_20_Text">&lt;/script&gt;</text:span></text:p>
      <text:p text:style-name="P4"><text:span text:style-name="Strong_20_Emphasis">¿Qué hace cada parte?</text:span></text:p>
      <text:p text:style-name="P4"><text:span text:style-name="Source_20_Text">if (stock &lt; 3)</text:span> — pregunta si el stock es menor a 3. Si es verdadero, guarda "Pedido urgente" en <text:span text:style-name="Source_20_Text">estadoStock</text:span>.</text:p>
      <text:p text:style-name="P4"><text:span text:style-name="Source_20_Text">else if (stock &gt;= 3 &amp;&amp; stock &lt;= 10)</text:span> — si la condición anterior fue falsa, ahora pregunta si el stock es mayor o igual a 3 <text:span text:style-name="Strong_20_Emphasis">y al mismo tiempo</text:span> menor o igual a 10. El <text:span text:style-name="Source_20_Text">&amp;&amp;</text:span> significa que ambas condiciones deben cumplirse juntas.</text:p>
      <text:p text:style-name="P4"><text:span text:style-name="Source_20_Text">else</text:span> — si ninguna de las condiciones anteriores se cumplió, significa que el stock es mayor a 10, entonces guarda "Stock suficiente". No necesita condición porque es el único caso que queda.</text:p>
      <text:p text:style-name="P4"><text:span text:style-name="Source_20_Text">alert(...)</text:span> — muestra todo junto: el nombre del componente (que vino del <text:span text:style-name="Source_20_Text">switch</text:span>), el número de stock, y el estado que determinamos con el <text:span text:style-name="Source_20_Text">if</text:span>.</text:p>
      <text:p text:style-name="P5"/>
      <text:p text:style-name="P1"><text:soft-page-break/>YO:</text:p>
      <text:p text:style-name="P5">y para argregar validaciones me explicarias el codigo?</text:p>
      <text:p text:style-name="P5">¡Claro! Te explico cómo agregar validaciones. Las validaciones sirven para controlar que el usuario ingrese datos correctos antes de continuar.</text:p>
      <text:p text:style-name="P6"><text:span text:style-name="Source_20_Text">&lt;script&gt;</text:span></text:p>
      <text:p text:style-name="P6"><text:span text:style-name="Source_20_Text"><text:s text:c="4"/>let componente = parseInt(prompt("Ingresa el numero del componente:\n1. Procesador\n2. Tarjeta Grafica\n3. Memoria RAM\n4. Disco Duro"));</text:span></text:p>
      <text:p text:style-name="P6"/>
      <text:p text:style-name="P6"><text:span text:style-name="Source_20_Text"><text:s text:c="4"/>// Validación 1: verificamos que el componente sea un número válido</text:span></text:p>
      <text:p text:style-name="P6"><text:span text:style-name="Source_20_Text"><text:s text:c="4"/>if (isNaN(componente) || componente &lt; 1 || componente &gt; 4) {</text:span></text:p>
      <text:p text:style-name="P6"><text:span text:style-name="Source_20_Text"><text:s text:c="8"/>alert("Número de componente no válido. Debe ser entre 1 y 4.");</text:span></text:p>
      <text:p text:style-name="P6"><text:span text:style-name="Source_20_Text"><text:s text:c="4"/>} else {</text:span></text:p>
      <text:p text:style-name="P6"/>
      <text:p text:style-name="P6"><text:span text:style-name="Source_20_Text"><text:s text:c="8"/>let stock = parseInt(prompt("Ingresa la cantidad disponible en stock:"));</text:span></text:p>
      <text:p text:style-name="P6"/>
      <text:p text:style-name="P6"><text:span text:style-name="Source_20_Text"><text:s text:c="8"/>// Validación 2: verificamos que el stock sea un número y no sea negativo</text:span></text:p>
      <text:p text:style-name="P6"><text:span text:style-name="Source_20_Text"><text:s text:c="8"/>if (isNaN(stock) || stock &lt; 0) {</text:span></text:p>
      <text:p text:style-name="P6"><text:span text:style-name="Source_20_Text"><text:s text:c="12"/>alert("La cantidad de stock no es válida. Debe ser un número mayor o igual a 0.");</text:span></text:p>
      <text:p text:style-name="P6"><text:span text:style-name="Source_20_Text"><text:s text:c="8"/>} else {</text:span></text:p>
      <text:p text:style-name="P6"/>
      <text:p text:style-name="P6"><text:span text:style-name="Source_20_Text"><text:s text:c="12"/>let nombreComponente;</text:span></text:p>
      <text:p text:style-name="P6"><text:span text:style-name="Source_20_Text"><text:s text:c="12"/>switch (componente) {</text:span></text:p>
      <text:p text:style-name="P6"><text:span text:style-name="Source_20_Text"><text:s text:c="16"/>case 1:</text:span></text:p>
      <text:p text:style-name="P6"><text:span text:style-name="Source_20_Text"><text:s text:c="20"/>nombreComponente = "Procesador";</text:span></text:p>
      <text:p text:style-name="P6"><text:span text:style-name="Source_20_Text"><text:s text:c="20"/>break;</text:span></text:p>
      <text:p text:style-name="P6"><text:span text:style-name="Source_20_Text"><text:s text:c="16"/>case 2:</text:span></text:p>
      <text:p text:style-name="P6"><text:span text:style-name="Source_20_Text"><text:s text:c="20"/>nombreComponente = "Tarjeta Grafica";</text:span></text:p>
      <text:p text:style-name="P6"><text:span text:style-name="Source_20_Text"><text:s text:c="20"/>break;</text:span></text:p>
      <text:p text:style-name="P6"><text:span text:style-name="Source_20_Text"><text:s text:c="16"/>case 3:</text:span></text:p>
      <text:p text:style-name="P6"><text:span text:style-name="Source_20_Text"><text:s text:c="20"/>nombreComponente = "Memoria RAM";</text:span></text:p>
      <text:p text:style-name="P6"><text:span text:style-name="Source_20_Text"><text:s text:c="20"/>break;</text:span></text:p>
      <text:p text:style-name="P6"><text:span text:style-name="Source_20_Text"><text:s text:c="16"/>case 4:</text:span></text:p>
      <text:p text:style-name="P6"><text:span text:style-name="Source_20_Text"><text:s text:c="20"/>nombreComponente = "Disco Duro";</text:span></text:p>
      <text:p text:style-name="P6"><text:span text:style-name="Source_20_Text"><text:s text:c="20"/>break;</text:span></text:p>
      <text:p text:style-name="P6"><text:span text:style-name="Source_20_Text"><text:s text:c="12"/>}</text:span></text:p>
      <text:p text:style-name="P6"><text:soft-page-break/></text:p>
      <text:p text:style-name="P6"><text:span text:style-name="Source_20_Text"><text:s text:c="12"/>let estadoStock;</text:span></text:p>
      <text:p text:style-name="P6"><text:span text:style-name="Source_20_Text"><text:s text:c="12"/>if (stock &lt; 3) {</text:span></text:p>
      <text:p text:style-name="P6"><text:span text:style-name="Source_20_Text"><text:s text:c="16"/>estadoStock = "Pedido urgente";</text:span></text:p>
      <text:p text:style-name="P6"><text:span text:style-name="Source_20_Text"><text:s text:c="12"/>} else if (stock &gt;= 3 &amp;&amp; stock &lt;= 10) {</text:span></text:p>
      <text:p text:style-name="P6"><text:span text:style-name="Source_20_Text"><text:s text:c="16"/>estadoStock = "Stock bajo, considerar reponer";</text:span></text:p>
      <text:p text:style-name="P6"><text:span text:style-name="Source_20_Text"><text:s text:c="12"/>} else {</text:span></text:p>
      <text:p text:style-name="P6"><text:span text:style-name="Source_20_Text"><text:s text:c="16"/>estadoStock = "Stock suficiente";</text:span></text:p>
      <text:p text:style-name="P6"><text:span text:style-name="Source_20_Text"><text:s text:c="12"/>}</text:span></text:p>
      <text:p text:style-name="P6"/>
      <text:p text:style-name="P6"><text:span text:style-name="Source_20_Text"><text:s text:c="12"/>alert("Componente: " + nombreComponente + "\nStock: " + stock + "\nEstado: " + estadoStock);</text:span></text:p>
      <text:p text:style-name="P6"><text:span text:style-name="Source_20_Text"><text:s text:c="8"/>}</text:span></text:p>
      <text:p text:style-name="P6"><text:span text:style-name="Source_20_Text"><text:s text:c="4"/>}</text:span></text:p>
      <text:p text:style-name="P6"><text:span text:style-name="Source_20_Text">&lt;/script&gt;</text:span></text:p>
      <text:p text:style-name="P4"><text:span text:style-name="Strong_20_Emphasis">¿Qué hace cada validación?</text:span></text:p>
      <text:p text:style-name="P4"><text:span text:style-name="Strong_20_Emphasis"><text:span text:style-name="Source_20_Text">isNaN(componente)</text:span></text:span> — <text:span text:style-name="Source_20_Text">isNaN</text:span> significa "is Not a Number" (¿no es un número?). Si el usuario escribe letras o deja vacío el prompt, <text:span text:style-name="Source_20_Text">parseInt</text:span> devuelve <text:span text:style-name="Source_20_Text">NaN</text:span>, y esta función detecta eso.</text:p>
      <text:p text:style-name="P4"><text:span text:style-name="Strong_20_Emphasis"><text:span text:style-name="Source_20_Text">componente &lt; 1 || componente &gt; 4</text:span></text:span> — verifica que el número esté dentro del rango permitido. El <text:span text:style-name="Source_20_Text">||</text:span> significa "o", entonces si es menor a 1 <text:span text:style-name="Strong_20_Emphasis">o</text:span> mayor a 4, la condición es verdadera y muestra el error.</text:p>
      <text:p text:style-name="P4"><text:span text:style-name="Strong_20_Emphasis"><text:span text:style-name="Source_20_Text">stock &lt; 0</text:span></text:span> — no tiene sentido tener stock negativo, entonces si el usuario ingresa un número negativo, se considera inválido.</text:p>
      <text:p text:style-name="P4"><text:span text:style-name="Strong_20_Emphasis">La estructura anidada </text:span><text:span text:style-name="Strong_20_Emphasis"><text:span text:style-name="Source_20_Text">if / else</text:span></text:span> — el segundo <text:span text:style-name="Source_20_Text">if</text:span> (el del stock) está dentro del <text:span text:style-name="Source_20_Text">else</text:span> del primero. Esto significa que solo se pregunta el stock si el componente ya fue validado correctamente. Así evitás ejecutar código innecesario cuando ya hubo un error.</text:p>
      <text:p text:style-name="P5">Ejercicio 2:</text:p>
      <text:p text:style-name="P7">para este ejercicio no use la ia</text:p>
      <text:p text:style-name="P8">EJERCICIO 3:</text:p>
      <text:p text:style-name="P8">YO</text:p>
      <text:p text:style-name="P8">podrias agregarle a este codigo Mostrar con un alert y por consola, un resumen con: ● Nombre del equipo. ● Nivel de prioridad. ● Mensaje de prioridad. ● Cantidad de días transcurridos. ● Estado de seguimiento. y despues explicarme para que sirve cada cosa porfa</text:p>
      <text:p text:style-name="P9"><text:span text:style-name="Source_20_Text">&lt;script&gt;</text:span></text:p>
      <text:p text:style-name="P9"><text:span text:style-name="Source_20_Text"><text:s text:c="8"/>let nombre = prompt("Ingresa el nombre de tu equipo:");</text:span></text:p>
      <text:p text:style-name="P9"><text:span text:style-name="Source_20_Text"><text:s text:c="8"/>let nivel = parseInt(prompt("Ingresa el nivel de prioridad 1 (baja), 2 (media), 3 (alta):"));</text:span></text:p>
      <text:p text:style-name="P9"><text:soft-page-break/><text:span text:style-name="Source_20_Text"><text:s text:c="8"/>let dias = parseInt (prompt("ingresa los dias transcurridos desde que se reporto el problema "));</text:span></text:p>
      <text:p text:style-name="P9"/>
      <text:p text:style-name="P9"><text:span text:style-name="Source_20_Text"><text:s text:c="8"/>let prioridad;</text:span></text:p>
      <text:p text:style-name="P9"><text:span text:style-name="Source_20_Text"><text:s text:c="8"/>if (nivel === 1) {</text:span></text:p>
      <text:p text:style-name="P9"><text:span text:style-name="Source_20_Text"><text:s text:c="12"/>prioridad = "La tarea puede programarse para los próximos días";</text:span></text:p>
      <text:p text:style-name="P9"><text:span text:style-name="Source_20_Text"><text:s text:c="8"/>} else if (nivel === 2) {</text:span></text:p>
      <text:p text:style-name="P9"><text:span text:style-name="Source_20_Text"><text:s text:c="12"/>prioridad = "La tarea debe realizarse esta semana.";</text:span></text:p>
      <text:p text:style-name="P9"><text:span text:style-name="Source_20_Text"><text:s text:c="8"/>} else if (nivel === 3) {</text:span></text:p>
      <text:p text:style-name="P9"><text:span text:style-name="Source_20_Text"><text:s text:c="12"/>prioridad = "La tarea requiere atención inmediata.";</text:span></text:p>
      <text:p text:style-name="P9"><text:span text:style-name="Source_20_Text"><text:s text:c="8"/>} else {</text:span></text:p>
      <text:p text:style-name="P9"><text:span text:style-name="Source_20_Text"><text:s text:c="12"/>prioridad = "Nivel no válido";</text:span></text:p>
      <text:p text:style-name="P9"><text:span text:style-name="Source_20_Text"><text:s text:c="8"/>}</text:span></text:p>
      <text:p text:style-name="P9"><text:span text:style-name="Source_20_Text"><text:s text:c="8"/>if (dias &gt; 7) {</text:span></text:p>
      <text:p text:style-name="P9"><text:span text:style-name="Source_20_Text"><text:s text:c="12"/>prioridad += " El problema ha estado sin resolver por más de una semana.";</text:span></text:p>
      <text:p text:style-name="P9"><text:span text:style-name="Source_20_Text"><text:s text:c="8"/>}</text:span></text:p>
      <text:p text:style-name="P9"><text:span text:style-name="Source_20_Text"><text:s text:c="8"/>let DiasRestantesTrascurridos;</text:span></text:p>
      <text:p text:style-name="P9"><text:span text:style-name="Source_20_Text"><text:s text:c="8"/>if (dias &lt; 3) {</text:span></text:p>
      <text:p text:style-name="P9"><text:span text:style-name="Source_20_Text"><text:s text:c="12"/>DiasRestantesTransucurridos = "seguimiento normal";</text:span></text:p>
      <text:p text:style-name="P9"><text:span text:style-name="Source_20_Text"><text:s text:c="8"/>} else if (dias &gt;= 3 &amp;&amp; dias &lt;= 7) {</text:span></text:p>
      <text:p text:style-name="P9"><text:span text:style-name="Source_20_Text"><text:s text:c="12"/>DiasRestantesTransucurridos = "realizar control del estado de la tarea";</text:span></text:p>
      <text:p text:style-name="P9"><text:span text:style-name="Source_20_Text"><text:s text:c="8"/>} else {</text:span></text:p>
      <text:p text:style-name="P9"><text:span text:style-name="Source_20_Text"><text:s text:c="12"/>DiasRestantesTransucurridos = "generar alerta por demora";</text:span></text:p>
      <text:p text:style-name="P9"><text:span text:style-name="Source_20_Text"><text:s text:c="8"/>}</text:span></text:p>
      <text:p text:style-name="P9"><text:span text:style-name="Source_20_Text"><text:s text:c="5"/></text:span></text:p>
      <text:p text:style-name="P9"/>
      <text:p text:style-name="P9"/>
      <text:p text:style-name="P9"/>
      <text:p text:style-name="P9"/>
      <text:p text:style-name="P9"><text:span text:style-name="Source_20_Text"><text:s text:c="4"/>&lt;/script&gt;</text:span></text:p>
      <text:p text:style-name="P9"><text:span text:style-name="Source_20_Text"><text:s text:c="4"/></text:span></text:p>
      <text:p text:style-name="P9"/>
      <text:p text:style-name="P9"><text:span text:style-name="Source_20_Text">&lt;/body&gt;</text:span></text:p>
      <text:p text:style-name="P9"><text:span text:style-name="Source_20_Text">&lt;/html&gt;</text:span></text:p>
      <text:p text:style-name="P8"/>
      <text:p text:style-name="P8"><text:soft-page-break/>IA: </text:p>
      <text:p text:style-name="P8">¡Claro! Acá está el código completo con el alert y el console.log agregados:</text:p>
      <text:p text:style-name="P9"><text:span text:style-name="Source_20_Text">&lt;script&gt;</text:span></text:p>
      <text:p text:style-name="P9"><text:span text:style-name="Source_20_Text"><text:s text:c="4"/>let nombre = prompt("Ingresa el nombre de tu equipo:");</text:span></text:p>
      <text:p text:style-name="P9"><text:span text:style-name="Source_20_Text"><text:s text:c="4"/>let nivel = parseInt(prompt("Ingresa el nivel de prioridad 1 (baja), 2 (media), 3 (alta):"));</text:span></text:p>
      <text:p text:style-name="P9"><text:span text:style-name="Source_20_Text"><text:s text:c="4"/>let dias = parseInt(prompt("Ingresa los dias transcurridos desde que se reporto el problema:"));</text:span></text:p>
      <text:p text:style-name="P9"/>
      <text:p text:style-name="P9"><text:span text:style-name="Source_20_Text"><text:s text:c="4"/>let prioridad;</text:span></text:p>
      <text:p text:style-name="P9"><text:span text:style-name="Source_20_Text"><text:s text:c="4"/>if (nivel === 1) {</text:span></text:p>
      <text:p text:style-name="P9"><text:span text:style-name="Source_20_Text"><text:s text:c="8"/>prioridad = "La tarea puede programarse para los próximos días";</text:span></text:p>
      <text:p text:style-name="P9"><text:span text:style-name="Source_20_Text"><text:s text:c="4"/>} else if (nivel === 2) {</text:span></text:p>
      <text:p text:style-name="P9"><text:span text:style-name="Source_20_Text"><text:s text:c="8"/>prioridad = "La tarea debe realizarse esta semana.";</text:span></text:p>
      <text:p text:style-name="P9"><text:span text:style-name="Source_20_Text"><text:s text:c="4"/>} else if (nivel === 3) {</text:span></text:p>
      <text:p text:style-name="P9"><text:span text:style-name="Source_20_Text"><text:s text:c="8"/>prioridad = "La tarea requiere atención inmediata.";</text:span></text:p>
      <text:p text:style-name="P9"><text:span text:style-name="Source_20_Text"><text:s text:c="4"/>} else {</text:span></text:p>
      <text:p text:style-name="P9"><text:span text:style-name="Source_20_Text"><text:s text:c="8"/>prioridad = "Nivel no válido";</text:span></text:p>
      <text:p text:style-name="P9"><text:span text:style-name="Source_20_Text"><text:s text:c="4"/>}</text:span></text:p>
      <text:p text:style-name="P9"/>
      <text:p text:style-name="P9"><text:span text:style-name="Source_20_Text"><text:s text:c="4"/>if (dias &gt; 7) {</text:span></text:p>
      <text:p text:style-name="P9"><text:span text:style-name="Source_20_Text"><text:s text:c="8"/>prioridad += " El problema ha estado sin resolver por más de una semana.";</text:span></text:p>
      <text:p text:style-name="P9"><text:span text:style-name="Source_20_Text"><text:s text:c="4"/>}</text:span></text:p>
      <text:p text:style-name="P9"/>
      <text:p text:style-name="P9"><text:span text:style-name="Source_20_Text"><text:s text:c="4"/>let estadoSeguimiento;</text:span></text:p>
      <text:p text:style-name="P9"><text:span text:style-name="Source_20_Text"><text:s text:c="4"/>if (dias &lt; 3) {</text:span></text:p>
      <text:p text:style-name="P9"><text:span text:style-name="Source_20_Text"><text:s text:c="8"/>estadoSeguimiento = "Seguimiento normal";</text:span></text:p>
      <text:p text:style-name="P9"><text:span text:style-name="Source_20_Text"><text:s text:c="4"/>} else if (dias &gt;= 3 &amp;&amp; dias &lt;= 7) {</text:span></text:p>
      <text:p text:style-name="P9"><text:span text:style-name="Source_20_Text"><text:s text:c="8"/>estadoSeguimiento = "Realizar control del estado de la tarea";</text:span></text:p>
      <text:p text:style-name="P9"><text:span text:style-name="Source_20_Text"><text:s text:c="4"/>} else {</text:span></text:p>
      <text:p text:style-name="P9"><text:span text:style-name="Source_20_Text"><text:s text:c="8"/>estadoSeguimiento = "Generar alerta por demora";</text:span></text:p>
      <text:p text:style-name="P9"><text:span text:style-name="Source_20_Text"><text:s text:c="4"/>}</text:span></text:p>
      <text:p text:style-name="P9"/>
      <text:p text:style-name="P9"><text:span text:style-name="Source_20_Text"><text:s text:c="4"/>// Armamos el resumen como un texto</text:span></text:p>
      <text:p text:style-name="P9"><text:span text:style-name="Source_20_Text"><text:s text:c="4"/>let resumen = "=== RESUMEN DEL EQUIPO ===\n" +</text:span></text:p>
      <text:p text:style-name="P9"><text:span text:style-name="Source_20_Text"><text:s text:c="18"/>"Equipo: " + nombre + "\n" +</text:span></text:p>
      <text:p text:style-name="P9"><text:soft-page-break/><text:span text:style-name="Source_20_Text"><text:s text:c="18"/>"Nivel de prioridad: " + nivel + "\n" +</text:span></text:p>
      <text:p text:style-name="P9"><text:span text:style-name="Source_20_Text"><text:s text:c="18"/>"Mensaje: " + prioridad + "\n" +</text:span></text:p>
      <text:p text:style-name="P9"><text:span text:style-name="Source_20_Text"><text:s text:c="18"/>"Días transcurridos: " + dias + "\n" +</text:span></text:p>
      <text:p text:style-name="P9"><text:span text:style-name="Source_20_Text"><text:s text:c="18"/>"Estado de seguimiento: " + estadoSeguimiento;</text:span></text:p>
      <text:p text:style-name="P9"/>
      <text:p text:style-name="P9"><text:span text:style-name="Source_20_Text"><text:s text:c="4"/>// Mostramos el resumen en un alert</text:span></text:p>
      <text:p text:style-name="P9"><text:span text:style-name="Source_20_Text"><text:s text:c="4"/>alert(resumen);</text:span></text:p>
      <text:p text:style-name="P9"/>
      <text:p text:style-name="P9"><text:span text:style-name="Source_20_Text"><text:s text:c="4"/>// Mostramos el resumen en la consola</text:span></text:p>
      <text:p text:style-name="P9"><text:span text:style-name="Source_20_Text"><text:s text:c="4"/>console.log(resumen);</text:span></text:p>
      <text:p text:style-name="P9"/>
      <text:p text:style-name="P9"><text:span text:style-name="Source_20_Text">&lt;/script&gt;</text:span></text:p>
      <text:p text:style-name="P10"><text:span text:style-name="Strong_20_Emphasis">¿Qué hace cada cosa nueva?</text:span></text:p>
      <text:p text:style-name="P10"><text:span text:style-name="Strong_20_Emphasis"><text:span text:style-name="Source_20_Text">let estadoSeguimiento</text:span></text:span> — corregí el nombre de la variable, en tu código original tenías <text:span text:style-name="Source_20_Text">DiasRestantesTrascurridos</text:span> donde se declaraba pero <text:span text:style-name="Source_20_Text">DiasRestantesTransucurridos</text:span> donde se asignaba, entonces JavaScript no la encontraba. Un nombre más claro y consistente evita ese tipo de errores.</text:p>
      <text:p text:style-name="P10"><text:span text:style-name="Strong_20_Emphasis"><text:span text:style-name="Source_20_Text">let resumen = "..." + "..." + "..."</text:span></text:span> — acá armamos un único texto con toda la información junta. El <text:span text:style-name="Source_20_Text">\n</text:span> dentro de las comillas es un salto de línea, que funciona tanto en el <text:span text:style-name="Source_20_Text">alert</text:span> como en la consola. El <text:span text:style-name="Source_20_Text">+</text:span> une los pedazos de texto uno tras otro.</text:p>
      <text:p text:style-name="P10"><text:span text:style-name="Strong_20_Emphasis"><text:span text:style-name="Source_20_Text">prioridad += "..."</text:span></text:span> — este signo que ya tenías significa "agregale esto al final de lo que ya tenía la variable". Entonces si el nivel era 3 y los días superan 7, el mensaje queda completo con ambas partes.</text:p>
      <text:p text:style-name="P10"><text:span text:style-name="Strong_20_Emphasis"><text:span text:style-name="Source_20_Text">alert(resumen)</text:span></text:span> — muestra una ventana emergente en el navegador con todo el texto del resumen. Es lo que ve el usuario.</text:p>
      <text:p text:style-name="P10"><text:span text:style-name="Strong_20_Emphasis"><text:span text:style-name="Source_20_Text">console.log(resumen)</text:span></text:span> — manda el mismo texto a la consola del navegador (la que se abre con F12). Es útil para que el programador pueda revisar los datos sin molestar al usuario con otra ventana.</text:p>
      <text:p text:style-name="P8">EJERCICIO 4:</text:p>
      <text:p text:style-name="P8">Responder brevemente: 1. ¿En qué situaciones utilizarías una estructura if-else? 2. ¿En qué situaciones utilizarías una estructura switch? 3. ¿Qué consulta realizada a la IA te resultó más útil para resolver las actividades? 4. ¿Qué aprendiste sobre el uso de la IA como asistente de programación? </text:p>
      <text:p text:style-name="P8">1. yo utilizaria una estructura if else cuando por ejemplo le pedimos que nos diga algo especifico que queremos que elegia y ponele en ves de eleguir de 1 a 5 eligue un 7 por ejemplo entoces ahi se podria decir si entoces eleguio un 7 mostrar un alert que diga que 7 no es una opcion valida o algo asi</text:p>
      <text:p text:style-name="P8"/>
      <text:p text:style-name="P8"><text:soft-page-break/>2. utilizaria una estructura switch cuando haces un codigo que sea de eleguir entre varias opciones para crearle un codigo en caso de que haya eleguido una opcion ponele 4 en ese caso se utilizaria</text:p>
      <text:p text:style-name="P8">3. la consula mas util que senti con la ia fue la del punto 3 por que la verdad no sabia como hacer para que muestre todo un resumen de todo y yo habia intentado hacerlo pero cuando se lo consulte a la ia me salvo por que lo hizo todo junto en una variable y despues solo hizo que la consola y el usuario pudiera leer esa variale y ahi saco el resumen la verdad esa me salvo mucho</text:p>
      <text:p text:style-name="P8">4. la verdad es muy buena el uso de la ia para la programacion por que es como si fuera un profesor que te explica como hacerlo y te lo hace como ejemplo o almenos yo lo veo asi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Tahoma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Tahoma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4T22:07:46.111614400</meta:creation-date>
    <dc:date>2026-06-14T23:49:10.889737700</dc:date>
    <meta:editing-duration>PT1H31M10S</meta:editing-duration>
    <meta:editing-cycles>1</meta:editing-cycles>
    <meta:document-statistic meta:table-count="0" meta:image-count="0" meta:object-count="0" meta:page-count="8" meta:paragraph-count="196" meta:word-count="1653" meta:character-count="11048" meta:non-whitespace-character-count="8142"/>
    <meta:generator>LibreOffice/25.2.7.2$Windows_X86_64 LibreOffice_project/5cbfd1ab6520636bb5f7b99185aa69bd7456825d</meta:generator>
  </office:meta>
</office:document-meta>
</file>